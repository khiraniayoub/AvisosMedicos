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FECHA">
            <text:p>FECHA</text:p>
          </table:table-cell>
          <table:table-cell table:style-name="pd1" office:value-type="string" office:string-value="TIPO EMISOR">
            <text:p>TIPO EMISOR</text:p>
          </table:table-cell>
          <table:table-cell table:style-name="pd1" office:value-type="string" office:string-value="EMISOR">
            <text:p>EMISOR</text:p>
          </table:table-cell>
          <table:table-cell table:style-name="pd1" office:value-type="string" office:string-value="HAB.">
            <text:p>HAB.</text:p>
          </table:table-cell>
          <table:table-cell table:style-name="pd1" office:value-type="string" office:string-value="TTOO">
            <text:p>TTOO</text:p>
          </table:table-cell>
          <table:table-cell table:style-name="pd1" office:value-type="string" office:string-value="MOTIVO LLAMADA">
            <text:p>MOTIVO LLAMADA</text:p>
          </table:table-cell>
          <table:table-cell table:style-name="pd1" office:value-type="string" office:string-value="NOMBRE PACIENTE">
            <text:p>NOMBRE PACIENTE</text:p>
          </table:table-cell>
          <table:table-cell table:style-name="pd1" office:value-type="string" office:string-value="NHC A XANIT">
            <text:p>NHC A XANIT</text:p>
          </table:table-cell>
          <table:table-cell table:style-name="pd1" office:value-type="string" office:string-value="MEDICO DE URGENCIAS">
            <text:p>MEDICO DE URGENCIAS</text:p>
          </table:table-cell>
          <table:table-cell table:style-name="pd1" office:value-type="string" office:string-value="OBSERVACIONES">
            <text:p>OBSERVACIONES</text:p>
          </table:table-cell>
          <table:table-cell table:style-name="pd1" office:value-type="string" office:string-value="MUNICIPIO">
            <text:p>MUNICIPIO</text:p>
          </table:table-cell>
          <table:table-cell table:style-name="pd1" office:value-type="string" office:string-value="ZONA AVISO">
            <text:p>ZONA AVISO</text:p>
          </table:table-cell>
        </table:table-row>
        <table:table-row>
          <table:table-cell office:value-type="string" office:string-value="07/04/2026">
            <text:p>07/04/2026</text:p>
          </table:table-cell>
          <table:table-cell office:value-type="string" office:string-value="Jaime">
            <text:p>Jaime</text:p>
          </table:table-cell>
          <table:table-cell office:value-type="string" office:string-value="Hotel ILUNION Malaga">
            <text:p>Hotel ILUNION Malaga</text:p>
          </table:table-cell>
          <table:table-cell office:value-type="string" office:string-value="05">
            <text:p>05</text:p>
          </table:table-cell>
          <table:table-cell office:value-type="string" office:string-value="N/A">
            <text:p>N/A</text:p>
          </table:table-cell>
          <table:table-cell office:value-type="string" office:string-value="DOLOR DE HOMBRO">
            <text:p>DOLOR DE HOMBRO</text:p>
          </table:table-cell>
          <table:table-cell office:value-type="string" office:string-value="DSDSDSD">
            <text:p>DSDSDSD</text:p>
          </table:table-cell>
          <table:table-cell office:value-type="string" office:string-value="N/A">
            <text:p>N/A</text:p>
          </table:table-cell>
          <table:table-cell office:value-type="string" office:string-value="N/A">
            <text:p>N/A</text:p>
          </table:table-cell>
          <table:table-cell office:value-type="string" office:string-value="N/A">
            <text:p>N/A</text:p>
          </table:table-cell>
          <table:table-cell office:value-type="string" office:string-value="Málaga">
            <text:p>Málaga</text:p>
          </table:table-cell>
          <table:table-cell office:value-type="string" office:string-value="ZONA MALAGA">
            <text:p>ZONA MALAGA</text:p>
          </table:table-cell>
        </table:table-row>
        <table:table-row>
          <table:table-cell office:value-type="string" office:string-value="08/04/2026">
            <text:p>08/04/2026</text:p>
          </table:table-cell>
          <table:table-cell office:value-type="string" office:string-value="RECEPCIÓN">
            <text:p>RECEPCIÓN</text:p>
          </table:table-cell>
          <table:table-cell office:value-type="string" office:string-value="Hotel Estepona Plaza">
            <text:p>Hotel Estepona Plaza</text:p>
          </table:table-cell>
          <table:table-cell office:value-type="string" office:string-value="N/A">
            <text:p>N/A</text:p>
          </table:table-cell>
          <table:table-cell office:value-type="string" office:string-value="N/A">
            <text:p>N/A</text:p>
          </table:table-cell>
          <table:table-cell office:value-type="string" office:string-value="N/A">
            <text:p>N/A</text:p>
          </table:table-cell>
          <table:table-cell office:value-type="string" office:string-value="fdfdfdfdf">
            <text:p>fdfdfdfdf</text:p>
          </table:table-cell>
          <table:table-cell office:value-type="string" office:string-value="454">
            <text:p>454</text:p>
          </table:table-cell>
          <table:table-cell office:value-type="string" office:string-value="N/A">
            <text:p>N/A</text:p>
          </table:table-cell>
          <table:table-cell office:value-type="string" office:string-value="N/A">
            <text:p>N/A</text:p>
          </table:table-cell>
          <table:table-cell office:value-type="string" office:string-value="Estepona">
            <text:p>Estepona</text:p>
          </table:table-cell>
          <table:table-cell office:value-type="string" office:string-value="ZONA COSTA OCCIDENTAL">
            <text:p>ZONA COSTA OCCIDENTAL</text:p>
          </table:table-cell>
        </table:table-row>
        <table:table-row>
          <table:table-cell office:value-type="string" office:string-value="09/04/2026">
            <text:p>09/04/2026</text:p>
          </table:table-cell>
          <table:table-cell office:value-type="string" office:string-value="RECEPCIÓN">
            <text:p>RECEPCIÓN</text:p>
          </table:table-cell>
          <table:table-cell office:value-type="string" office:string-value="Hotel Yaramar">
            <text:p>Hotel Yaramar</text:p>
          </table:table-cell>
          <table:table-cell office:value-type="string" office:string-value="10">
            <text:p>10</text:p>
          </table:table-cell>
          <table:table-cell office:value-type="string" office:string-value="Bravo Tour Plus">
            <text:p>Bravo Tour Plus</text:p>
          </table:table-cell>
          <table:table-cell office:value-type="string" office:string-value="gea">
            <text:p>gea</text:p>
          </table:table-cell>
          <table:table-cell office:value-type="string" office:string-value="hola caracola">
            <text:p>hola caracola</text:p>
          </table:table-cell>
          <table:table-cell office:value-type="string" office:string-value="4545545">
            <text:p>4545545</text:p>
          </table:table-cell>
          <table:table-cell office:value-type="string" office:string-value="Dr. Edward Jenner">
            <text:p>Dr. Edward Jenner</text:p>
          </table:table-cell>
          <table:table-cell office:value-type="string" office:string-value="esto es una prueba">
            <text:p>esto es una prueba</text:p>
          </table:table-cell>
          <table:table-cell office:value-type="string" office:string-value="Fuengirola">
            <text:p>Fuengirola</text:p>
          </table:table-cell>
          <table:table-cell office:value-type="string" office:string-value="ZONA COSTA OCCIDENTAL">
            <text:p>ZONA COSTA OCCIDENTAL</text:p>
          </table:table-cell>
        </table:table-row>
        <table:table-row>
          <table:table-cell office:value-type="string" office:string-value="09/04/2026">
            <text:p>09/04/2026</text:p>
          </table:table-cell>
          <table:table-cell office:value-type="string" office:string-value="RECEPCIÓN">
            <text:p>RECEPCIÓN</text:p>
          </table:table-cell>
          <table:table-cell office:value-type="string" office:string-value="Hotel Angela">
            <text:p>Hotel Angela</text:p>
          </table:table-cell>
          <table:table-cell office:value-type="string" office:string-value="15">
            <text:p>15</text:p>
          </table:table-cell>
          <table:table-cell office:value-type="string" office:string-value="N/A">
            <text:p>N/A</text:p>
          </table:table-cell>
          <table:table-cell office:value-type="string" office:string-value="CAIDA">
            <text:p>CAIDA</text:p>
          </table:table-cell>
          <table:table-cell office:value-type="string" office:string-value="HANSI FLICK">
            <text:p>HANSI FLICK</text:p>
          </table:table-cell>
          <table:table-cell office:value-type="string" office:string-value="N/A">
            <text:p>N/A</text:p>
          </table:table-cell>
          <table:table-cell office:value-type="string" office:string-value="Dr. Louis Pasteur">
            <text:p>Dr. Louis Pasteur</text:p>
          </table:table-cell>
          <table:table-cell office:value-type="string" office:string-value="N/A">
            <text:p>N/A</text:p>
          </table:table-cell>
          <table:table-cell office:value-type="string" office:string-value="Fuengirola">
            <text:p>Fuengirola</text:p>
          </table:table-cell>
          <table:table-cell office:value-type="string" office:string-value="ZONA COSTA OCCIDENTAL">
            <text:p>ZONA COSTA OCCIDENT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